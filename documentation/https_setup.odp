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40000010666F57C43.png" manifest:media-type="image/png"/>
  <manifest:file-entry manifest:full-path="Pictures/10000000000005A000000BE0049866D6.png" manifest:media-type="image/png"/>
  <manifest:file-entry manifest:full-path="Pictures/1000000100000275000000A4458432C3.png" manifest:media-type="image/png"/>
  <manifest:file-entry manifest:full-path="Pictures/10000001000001FE000000F4FA91CD1C.png" manifest:media-type="image/png"/>
  <manifest:file-entry manifest:full-path="Pictures/1000000100000533000000CD483D6912.png" manifest:media-type="image/png"/>
  <manifest:file-entry manifest:full-path="Pictures/10000001000002950000014A326B2B25.png" manifest:media-type="image/png"/>
  <manifest:file-entry manifest:full-path="Pictures/10000001000002FF000000EE23377EAB.png" manifest:media-type="image/png"/>
  <manifest:file-entry manifest:full-path="Pictures/10000001000004CA000002E3A6C2DE8B.png" manifest:media-type="image/png"/>
  <manifest:file-entry manifest:full-path="Pictures/10000001000003A70000011314CD1602.png" manifest:media-type="image/png"/>
  <manifest:file-entry manifest:full-path="Pictures/10000001000005D700000177FE388D0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5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4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3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20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196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12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Courier New" fo:font-size="10pt"/>
    </style:style>
    <style:style style:name="P8" style:family="paragraph">
      <loext:graphic-properties draw:fill="none" draw:fill-color="#ffffff"/>
      <style:text-properties style:font-name="Courier New" fo:font-size="6pt"/>
    </style:style>
    <style:style style:name="T1" style:family="text">
      <style:text-properties style:font-name="Arial"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Courier New" fo:font-size="10pt"/>
    </style:style>
    <style:style style:name="T5" style:family="text">
      <style:text-properties style:font-name="Courier New"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063cm" svg:height="5.282cm" svg:x="1.162cm" svg:y="2.338cm">
          <draw:image xlink:href="Pictures/10000001000005D700000177FE388D08.png" xlink:type="simple" xlink:show="embed" xlink:actuate="onLoad" draw:mime-type="image/png">
            <text:p/>
          </draw:image>
        </draw:frame>
        <draw:frame draw:style-name="gr2" draw:text-style-name="P2" draw:layer="layout" svg:width="9.559cm" svg:height="1.673cm" svg:x="2.871cm" svg:y="0.624cm">
          <draw:text-box>
            <text:p><text:span text:style-name="T1">stechertennis.dedyn.io</text:span></text:p>
            <text:p><text:span text:style-name="T1">https://stechertennis.dedyn.io/index</text:span></text:p>
            <text:p><text:span text:style-name="T1">token: WkMmVe6sG6V6FDBnG7skamm8oWTC</text:span></text:p>
          </draw:text-box>
        </draw:frame>
        <draw:frame draw:style-name="gr1" draw:text-style-name="P1" draw:layer="layout" svg:width="11.181cm" svg:height="6.739cm" svg:x="1.519cm" svg:y="8.255cm">
          <draw:image xlink:href="Pictures/10000001000004CA000002E3A6C2DE8B.png" xlink:type="simple" xlink:show="embed" xlink:actuate="onLoad" draw:mime-type="image/png">
            <text:p/>
          </draw:image>
        </draw:frame>
        <draw:frame draw:style-name="gr2" draw:text-style-name="P2" draw:layer="layout" svg:width="9.559cm" svg:height="1.673cm" svg:x="13.301cm" svg:y="8.487cm">
          <draw:text-box>
            <text:p text:style-name="P3"><text:span text:style-name="T2">stechertennis.duckdns.org</text:span><text:span text:style-name="T2"><text:line-break/></text:span><text:span text:style-name="T2">https://</text:span><text:span text:style-name="T3">stechertennis.duckdns.org</text:span><text:span text:style-name="T3"><text:line-break/></text:span><text:span text:style-name="T3">token: f5035eb4-6739-4f5e-b0e7-5ee827c7062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0.92cm" svg:height="5.451cm" svg:x="0.595cm" svg:y="1.235cm">
          <draw:image xlink:href="Pictures/10000001000002950000014A326B2B25.png" xlink:type="simple" xlink:show="embed" xlink:actuate="onLoad" draw:mime-type="image/png">
            <text:p/>
          </draw:image>
        </draw:frame>
        <draw:frame draw:style-name="gr4" draw:text-style-name="P2" draw:layer="layout" svg:width="4.643cm" svg:height="0.725cm" svg:x="1.072cm" svg:y="0.635cm">
          <draw:text-box>
            <text:p><text:span text:style-name="T1">Router: FritzBox-7590</text:span></text:p>
          </draw:text-box>
        </draw:frame>
        <draw:frame draw:style-name="gr1" draw:text-style-name="P1" draw:layer="layout" svg:width="11.47cm" svg:height="3.559cm" svg:x="0.595cm" svg:y="7.02cm">
          <draw:image xlink:href="Pictures/10000001000002FF000000EE23377EAB.png" xlink:type="simple" xlink:show="embed" xlink:actuate="onLoad" draw:mime-type="image/png">
            <text:p/>
          </draw:image>
        </draw:frame>
        <draw:frame draw:style-name="gr5" draw:text-style-name="P2" draw:layer="layout" svg:width="1.82cm" svg:height="0.725cm" svg:x="17.447cm" svg:y="6.785cm">
          <draw:text-box>
            <text:p><text:span text:style-name="T1">Pi-hole</text:span></text:p>
          </draw:text-box>
        </draw:frame>
        <draw:frame draw:style-name="gr6" draw:text-style-name="P5" draw:layer="layout" svg:width="20.32cm" svg:height="3.129cm" svg:x="0.635cm" svg:y="11.476cm">
          <draw:image xlink:href="Pictures/1000000100000533000000CD483D6912.png" xlink:type="simple" xlink:show="embed" xlink:actuate="onLoad" draw:mime-type="image/png">
            <text:p/>
          </draw:image>
        </draw:frame>
        <draw:frame draw:style-name="gr6" draw:text-style-name="P5" draw:layer="layout" svg:width="9.153cm" svg:height="4.378cm" svg:x="17.517cm" svg:y="7.487cm">
          <draw:image xlink:href="Pictures/10000001000001FE000000F4FA91CD1C.png" xlink:type="simple" xlink:show="embed" xlink:actuate="onLoad" draw:mime-type="image/png">
            <text:p/>
          </draw:image>
        </draw:frame>
        <draw:frame draw:style-name="gr6" draw:text-style-name="P5" draw:layer="layout" svg:width="13.252cm" svg:height="3.897cm" svg:x="12.065cm" svg:y="1.27cm">
          <draw:image xlink:href="Pictures/10000001000003A70000011314CD16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9.148cm" svg:height="2.385cm" svg:x="0.635cm" svg:y="10.47cm">
          <draw:image xlink:href="Pictures/1000000100000275000000A4458432C3.png" xlink:type="simple" xlink:show="embed" xlink:actuate="onLoad" draw:mime-type="image/png">
            <text:p/>
          </draw:image>
        </draw:frame>
        <draw:frame draw:style-name="gr7" draw:text-style-name="P2" draw:layer="layout" svg:width="1.184cm" svg:height="0.725cm" svg:x="0.721cm" svg:y="0.545cm">
          <draw:text-box>
            <text:p><text:span text:style-name="T1">RPi</text:span></text:p>
          </draw:text-box>
        </draw:frame>
        <draw:frame draw:style-name="gr8" draw:text-style-name="P7" draw:layer="layout" svg:width="22.225cm" svg:height="10.16cm" svg:x="2.54cm" svg:y="0.635cm">
          <draw:text-box>
            <text:p><text:span text:style-name="T4">sudo certbot --nginx -d stechertennis.dedyn.io</text:span></text:p>
            <text:p><text:span text:style-name="T4">Saving debug log to /var/log/letsencrypt/letsencrypt.log</text:span></text:p>
            <text:p><text:span text:style-name="T4">Requesting a certificate for stechertennis.dedyn.io</text:span></text:p>
            <text:p><text:span text:style-name="T4"/></text:p>
            <text:p><text:span text:style-name="T4">Successfully received certificate.</text:span></text:p>
            <text:p><text:span text:style-name="T4">Certificate is saved at: /etc/letsencrypt/live/stechertennis.dedyn.io/fullchain.pem</text:span></text:p>
            <text:p><text:span text:style-name="T4">Key is saved at: <text:s text:c="8"/>/etc/letsencrypt/live/stechertennis.dedyn.io/privkey.pem</text:span></text:p>
            <text:p><text:span text:style-name="T4">This certificate expires on 2025-05-14.</text:span></text:p>
            <text:p><text:span text:style-name="T4">These files will be updated when the certificate renews.</text:span></text:p>
            <text:p><text:span text:style-name="T4">Certbot has set up a scheduled task to automatically renew this certificate in the background.</text:span></text:p>
            <text:p><text:span text:style-name="T4"/></text:p>
            <text:p><text:span text:style-name="T4">Deploying certificate</text:span></text:p>
            <text:p><text:span text:style-name="T4">Successfully deployed certificate for stechertennis.dedyn.io to /etc/nginx/sites-enabled/stecher_tennis</text:span></text:p>
            <text:p><text:span text:style-name="T4">Congratulations! You have successfully enabled HTTPS on https://stechertennis.dedyn.io</text:span></text:p>
            <text:p><text:span text:style-name="T4"/></text:p>
            <text:p><text:span text:style-name="T4">- - - - - - - - - - - - - - - - - - - - - - - - - - - - - - - - - - - - - - - -</text:span></text:p>
            <text:p><text:span text:style-name="T4">If you like Certbot, please consider supporting our work by:</text:span></text:p>
            <text:p><text:span text:style-name="T4"><text:s/></text:span><text:span text:style-name="T4">* Donating to ISRG / Let's Encrypt: <text:s text:c="2"/>https://letsencrypt.org/donate</text:span></text:p>
            <text:p><text:span text:style-name="T4"><text:s/></text:span><text:span text:style-name="T4">* Donating to EFF: <text:s text:c="19"/>https://eff.org/donate-le</text:span></text:p>
            <text:p><text:span text:style-name="T4">- - - - - - - - - - - - - - - - - - - - - - - - - - - - - - - - - - - - - - - -</text:span></text:p>
            <text:p><text:span text:style-name="T4"/></text:p>
            <text:p><text:span text:style-name="T4">source ./bin/activate</text:span></text:p>
            <text:p><text:span text:style-name="T4">gunicorn --worker-class gevent --bind 127.0.0.1:5000 app:app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7" draw:text-style-name="P2" draw:layer="layout" svg:width="1.184cm" svg:height="0.725cm" svg:x="0.721cm" svg:y="0.545cm">
          <draw:text-box>
            <text:p><text:span text:style-name="T1">RPi</text:span></text:p>
          </draw:text-box>
        </draw:frame>
        <draw:frame draw:style-name="gr9" draw:text-style-name="P8" draw:layer="layout" svg:width="24.465cm" svg:height="15.013cm" svg:x="2.205cm" svg:y="0.368cm">
          <draw:text-box>
            <text:p><text:span text:style-name="T5">server {</text:span></text:p>
            <text:p><text:span text:style-name="T5"><text:s text:c="4"/></text:span><text:span text:style-name="T5">listen 443 ssl http2;</text:span></text:p>
            <text:p><text:span text:style-name="T5"><text:s text:c="4"/></text:span><text:span text:style-name="T5">listen [::]:443 ssl http2;</text:span></text:p>
            <text:p><text:span text:style-name="T5"><text:s text:c="4"/></text:span><text:span text:style-name="T5">server_name stechertennis.duckdns.org;</text:span></text:p>
            <text:p><text:span text:style-name="T5"/></text:p>
            <text:p><text:span text:style-name="T5"><text:s text:c="4"/></text:span><text:span text:style-name="T5"># Direkt weiterleiten von "/" auf "/stecher_start"</text:span></text:p>
            <text:p><text:span text:style-name="T5"><text:s text:c="4"/></text:span><text:span text:style-name="T5">location = / {</text:span></text:p>
            <text:p><text:span text:style-name="T5"><text:s text:c="8"/></text:span><text:span text:style-name="T5">return 301 /stecher_start;</text:span></text:p>
            <text:p><text:span text:style-name="T5"><text:s text:c="4"/></text:span><text:span text:style-name="T5">}</text:span></text:p>
            <text:p><text:span text:style-name="T5"/></text:p>
            <text:p><text:span text:style-name="T5"><text:s text:c="4"/></text:span><text:span text:style-name="T5">location /stecher_start {</text:span></text:p>
            <text:p><text:span text:style-name="T5"><text:s text:c="8"/></text:span><text:span text:style-name="T5">proxy_pass http://127.0.0.1:5000;</text:span></text:p>
            <text:p><text:span text:style-name="T5"/></text:p>
            <text:p><text:span text:style-name="T5"><text:s text:c="8"/></text:span><text:span text:style-name="T5"># Required for WebSocket</text:span></text:p>
            <text:p><text:span text:style-name="T5"><text:s text:c="8"/></text:span><text:span text:style-name="T5">proxy_http_version 1.1;</text:span></text:p>
            <text:p><text:span text:style-name="T5"><text:s text:c="8"/></text:span><text:span text:style-name="T5">proxy_set_header Upgrade $http_upgrade;</text:span></text:p>
            <text:p><text:span text:style-name="T5"><text:s text:c="8"/></text:span><text:span text:style-name="T5">proxy_set_header Connection "Upgrade";</text:span></text:p>
            <text:p><text:span text:style-name="T5"/></text:p>
            <text:p><text:span text:style-name="T5"><text:s text:c="8"/></text:span><text:span text:style-name="T5"># (optional) keep-alive and host</text:span></text:p>
            <text:p><text:span text:style-name="T5"><text:s text:c="8"/></text:span><text:span text:style-name="T5">proxy_set_header Host $host;</text:span></text:p>
            <text:p><text:span text:style-name="T5"><text:s text:c="8"/></text:span><text:span text:style-name="T5">proxy_set_header X-Real-IP $remote_addr;</text:span></text:p>
            <text:p><text:span text:style-name="T5"><text:s text:c="8"/></text:span><text:span text:style-name="T5">proxy_set_header X-Forwarded-For $proxy_add_x_forwarded_for;</text:span></text:p>
            <text:p><text:span text:style-name="T5"><text:s text:c="8"/></text:span><text:span text:style-name="T5">proxy_set_header X-Forwarded-Proto $scheme;</text:span></text:p>
            <text:p><text:span text:style-name="T5"><text:s text:c="4"/></text:span><text:span text:style-name="T5">}</text:span></text:p>
            <text:p><text:span text:style-name="T5"/></text:p>
            <text:p><text:span text:style-name="T5"><text:s text:c="4"/></text:span><text:span text:style-name="T5">ssl_certificate /etc/letsencrypt/live/stechertennis.dedyn.io/fullchain.pem;</text:span></text:p>
            <text:p><text:span text:style-name="T5"><text:s text:c="4"/></text:span><text:span text:style-name="T5">ssl_certificate_key /etc/letsencrypt/live/stechertennis.dedyn.io/privkey.pem;</text:span></text:p>
            <text:p><text:span text:style-name="T5"><text:s text:c="4"/></text:span><text:span text:style-name="T5">include /etc/letsencrypt/options-ssl-nginx.conf;</text:span></text:p>
            <text:p><text:span text:style-name="T5"><text:s text:c="4"/></text:span><text:span text:style-name="T5">ssl_dhparam /etc/letsencrypt/ssl-dhparams.pem;</text:span></text:p>
            <text:p><text:span text:style-name="T5"/></text:p>
            <text:p><text:span text:style-name="T5"><text:s text:c="4"/></text:span><text:span text:style-name="T5"># 🔐 Sichere SSL-Einstellungen für A+ Rating auf SSL Labs</text:span></text:p>
            <text:p><text:span text:style-name="T5"><text:s text:c="4"/></text:span><text:span text:style-name="T5">ssl_session_cache shared:SSL:10m;</text:span></text:p>
            <text:p><text:span text:style-name="T5"><text:s text:c="4"/></text:span><text:span text:style-name="T5">ssl_stapling on;</text:span></text:p>
            <text:p><text:span text:style-name="T5"><text:s text:c="4"/></text:span><text:span text:style-name="T5">ssl_stapling_verify on;</text:span></text:p>
            <text:p><text:span text:style-name="T5"><text:s text:c="4"/></text:span><text:span text:style-name="T5">resolver 1.1.1.1 8.8.8.8 valid=300s;</text:span></text:p>
            <text:p><text:span text:style-name="T5"><text:s text:c="4"/></text:span><text:span text:style-name="T5">resolver_timeout 5s;</text:span></text:p>
            <text:p><text:span text:style-name="T5"/></text:p>
            <text:p><text:span text:style-name="T5"><text:s text:c="4"/></text:span><text:span text:style-name="T5"># Sicherheitseinstellungen gegen Angriffe</text:span></text:p>
            <text:p><text:span text:style-name="T5"><text:s text:c="4"/></text:span><text:span text:style-name="T5">add_header X-Frame-Options SAMEORIGIN;</text:span></text:p>
            <text:p><text:span text:style-name="T5"><text:s text:c="4"/></text:span><text:span text:style-name="T5">add_header X-XSS-Protection "1; mode=block";</text:span></text:p>
            <text:p><text:span text:style-name="T5"><text:s text:c="4"/></text:span><text:span text:style-name="T5">add_header X-Content-Type-Options nosniff;</text:span></text:p>
            <text:p><text:span text:style-name="T5"><text:s text:c="4"/></text:span><text:span text:style-name="T5">add_header Referrer-Policy "strict-origin-when-cross-origin";</text:span></text:p>
            <text:p><text:span text:style-name="T5"><text:s text:c="4"/></text:span><text:span text:style-name="T5">add_header Permissions-Policy "geolocation=(), microphone=(), camera=()";</text:span></text:p>
            <text:p><text:span text:style-name="T5"/></text:p>
            <text:p><text:span text:style-name="T5"><text:s text:c="4"/></text:span><text:span text:style-name="T5"># HSTS aktivieren (nur, wenn du sicher bist, dass HTTPS immer genutzt wird)</text:span></text:p>
            <text:p><text:span text:style-name="T5"><text:s text:c="4"/></text:span><text:span text:style-name="T5">add_header Strict-Transport-Security "max-age=31536000; includeSubDomains; preload" always;</text:span></text:p>
            <text:p><text:span text:style-name="T5"/></text:p>
            <text:p><text:span text:style-name="T5"><text:s text:c="4"/></text:span><text:span text:style-name="T5"># Logging für Debugging</text:span></text:p>
            <text:p><text:span text:style-name="T5"><text:s text:c="4"/></text:span><text:span text:style-name="T5">access_log /var/log/nginx/stechertennis.access.log;</text:span></text:p>
            <text:p><text:span text:style-name="T5"><text:s text:c="4"/></text:span><text:span text:style-name="T5">error_log /var/log/nginx/stechertennis.error.log warn;</text:span></text:p>
            <text:p><text:span text:style-name="T5">}</text:span></text:p>
            <text:p><text:span text:style-name="T5"/></text:p>
            <text:p><text:span text:style-name="T5">server {</text:span></text:p>
            <text:p><text:span text:style-name="T5"><text:s text:c="4"/></text:span><text:span text:style-name="T5">listen 80;</text:span></text:p>
            <text:p><text:span text:style-name="T5"><text:s text:c="4"/></text:span><text:span text:style-name="T5">listen [::]:80;</text:span></text:p>
            <text:p><text:span text:style-name="T5"><text:s text:c="4"/></text:span><text:span text:style-name="T5">server_name stechertennis.duckdns.org;</text:span></text:p>
            <text:p><text:span text:style-name="T5"/></text:p>
            <text:p><text:span text:style-name="T5"><text:s text:c="4"/></text:span><text:span text:style-name="T5"># Automatische Weiterleitung von HTTP auf HTTPS</text:span></text:p>
            <text:p><text:span text:style-name="T5"><text:s text:c="4"/></text:span><text:span text:style-name="T5">return 301 https://$host$request_uri;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0" draw:text-style-name="P2" draw:layer="layout" svg:width="5.702cm" svg:height="0.725cm" svg:x="0.721cm" svg:y="0.545cm">
          <draw:text-box>
            <text:p><text:span text:style-name="T1"><text:s/></text:span><text:span text:style-name="T1">Android-Smartphone Error:</text:span></text:p>
          </draw:text-box>
        </draw:frame>
        <draw:frame draw:style-name="gr1" draw:text-style-name="P1" draw:layer="layout" svg:width="4.156cm" svg:height="8.775cm" svg:x="1.559cm" svg:y="2.02cm">
          <draw:image xlink:href="Pictures/10000000000005A000000BE0049866D6.png" xlink:type="simple" xlink:show="embed" xlink:actuate="onLoad" draw:mime-type="image/png">
            <text:p/>
          </draw:image>
        </draw:frame>
        <draw:frame draw:style-name="gr1" draw:text-style-name="P1" draw:layer="layout" svg:width="11.347cm" svg:height="3.033cm" svg:x="9.525cm" svg:y="1.27cm">
          <draw:image xlink:href="Pictures/10000001000003D40000010666F57C43.png" xlink:type="simple" xlink:show="embed" xlink:actuate="onLoad" draw:mime-type="image/png">
            <text:p/>
          </draw:image>
        </draw:frame>
        <draw:frame draw:style-name="gr11" draw:text-style-name="P2" draw:layer="layout" svg:width="5.696cm" svg:height="0.725cm" svg:x="9.921cm" svg:y="0.546cm">
          <draw:text-box>
            <text:p><text:span text:style-name="T1"><text:s/></text:span><text:span text:style-name="T1">From local pc: it work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07:52:10.269625363</meta:creation-date>
    <dc:date>2025-02-20T13:51:00.531833646</dc:date>
    <meta:editing-duration>PT52M16S</meta:editing-duration>
    <meta:editing-cycles>17</meta:editing-cycles>
    <meta:generator>LibreOffice/24.2.7.2$Linux_X86_64 LibreOffice_project/420$Build-2</meta:generator>
    <meta:print-date>2025-02-20T13:49:22.914660186</meta:print-date>
    <meta:printed-by>PDF files</meta:printed-by>
    <meta:document-statistic meta:object-count="51"/>
  </office:meta>
</office:document-meta>
</file>